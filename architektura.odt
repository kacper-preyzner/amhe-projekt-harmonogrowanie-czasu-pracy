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📥 Dane wejściowe</text:h>
      <text:p text:style-name="Text_20_body">To wszystko, co algorytm musi wiedzieć, żeby zacząć pracę — historia połączeń z zeszłych tygodni, lista pracowników z ich preferencjami, kalendarz ze świętami. Bez tych danych nie ma z czego układać harmonogramu.</text:p>
      <text:h text:style-name="Heading_20_3" text:outline-level="3">🔮 Model predykcyjny (LSTM / XGBoost)</text:h>
      <text:p text:style-name="Text_20_body">To "wróżka" — patrzy na dane z przeszłości i zgaduje, ile połączeń będzie w każdym półgodzinnym okienku przyszłego tygodnia. Dzięki temu algorytm wie, ilu ludzi potrzeba o której godzinie, zanim zacznie układać grafik.</text:p>
      <text:h text:style-name="Heading_20_3" text:outline-level="3">🧬 Algorytm memetyczny (NSGA-II + lokalne przeszukiwanie)</text:h>
      <text:p text:style-name="Text_20_body">To serce całego systemu — tworzy 100 losowych grafików, ocenia je, krzyżuje najlepsze, powtarza 1000 razy aż wyjdzie coś dobrego (to <text:span text:style-name="Strong_20_Emphasis">GA</text:span>). Każdy nowy grafik jeszcze dodatkowo "dopieszcza" drobnymi zmianami, np. zamienia zmiany między dwoma pracownikami jeśli to daje lepszy wynik (to <text:span text:style-name="Strong_20_Emphasis">lokalne przeszukiwanie</text:span>).</text:p>
      <text:h text:style-name="Heading_20_3" text:outline-level="3">🔧 Operator naprawczy</text:h>
      <text:p text:style-name="Text_20_body">To "strażnik prawa" — bierze grafik stworzony przez algorytm i sprawdza, czy nie łamie Kodeksu pracy (za mało odpoczynku, za dużo godzin). Jeśli coś jest nie tak, automatycznie naprawia — przesuwa zmiany, dodaje wolne, aż grafik jest w 100% legalny.</text:p>
      <text:h text:style-name="Heading_20_3" text:outline-level="3">⚡ Reoptymalizacja real-time</text:h>
      <text:p text:style-name="Text_20_body">To "pogotowie" — gdy w środę rano Ania zadzwoni z L4, nie układamy całego grafiku od nowa. Zamiast tego szybko łatamy tylko dziurę po Ani, szukając kogoś wolnego z odpowiednimi kompetencjami.</text:p>
      <text:h text:style-name="Heading_20_3" text:outline-level="3">📤 Harmonogram (front Pareto)</text:h>
      <text:p text:style-name="Text_20_body">To wynik końcowy, ale nie jeden grafik — kilka różnych, pokazujących kompromisy. Np. <text:span text:style-name="Emphasis">"wariant A: tani, ale mniej komfortowy dla ludzi"</text:span> vs <text:span text:style-name="Emphasis">"wariant B: droższy, ale wszyscy zadowoleni"</text:span> — manager wybiera ten, który mu pasuje.</text:p>
      <text:h text:style-name="Heading_20_3" text:outline-level="3">🧪 Baseline CP-SAT (z boku, linia przerywana)</text:h>
      <text:p text:style-name="Text_20_body">To "dokładny solver" z Google OR-Tools, który dla małych przypadków (10 pracowników, 7 dni) potrafi znaleźć najlepsze możliwe rozwiązanie, ale dla dużych się dławi. Używamy go tylko do porównania — sprawdzamy, czy nasz szybki algorytm daje wyniki bliskie optimu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16:36:07.495614831</meta:creation-date>
    <meta:print-date>2026-04-23T16:37:16.575064684</meta:print-date>
    <meta:printed-by>PDF files</meta:printed-by>
    <dc:date>2026-04-23T16:37:36.545277750</dc:date>
    <meta:editing-duration>PT19S</meta:editing-duration>
    <meta:editing-cycles>1</meta:editing-cycles>
    <meta:document-statistic meta:table-count="0" meta:image-count="0" meta:object-count="0" meta:page-count="1" meta:paragraph-count="14" meta:word-count="278" meta:character-count="1889" meta:non-whitespace-character-count="1616"/>
    <meta:generator>LibreOffice/25.8.6.2$Linux_X86_64 LibreOffice_project/580$Build-2</meta:generator>
  </office:meta>
</office:document-meta>
</file>